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co2" style:family="table-column">
      <style:table-column-properties fo:break-before="auto" style:column-width="0.799cm"/>
    </style:style>
    <style:style style:name="co3" style:family="table-column">
      <style:table-column-properties fo:break-before="auto" style:column-width="1.699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>
        <table:iteration table:maximum-difference="0.0001"/>
      </table:calculation-settings>
      <table:table table:name="Лист 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2" table:number-columns-repeated="2" table:default-cell-style-name="ce6"/>
        <table:table-column table:style-name="co3" table:number-columns-repeated="16379" table:default-cell-style-name="Default"/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MAX(VLOOKUP([.C2];[.A:.F];6;0);VLOOKUP([.D2];[.A:.F];6;0);VLOOKUP([.E2];[.A:.F];6;0);) + [.B2]" office:value-type="float" office:value="20" calcext:value-type="float">
            <text:p>20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3];[.A:.F];6;0);VLOOKUP([.D3];[.A:.F];6;0);VLOOKUP([.E3];[.A:.F];6;0);) + [.B3]"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table:formula="of:=MAX(VLOOKUP([.C4];[.A:.F];6;0);VLOOKUP([.D4];[.A:.F];6;0);VLOOKUP([.E4];[.A:.F];6;0);) + [.B4]" office:value-type="float" office:value="24" calcext:value-type="float">
            <text:p>24</text:p>
          </table:table-cell>
          <table:table-cell table:number-columns-repeated="1637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AX(VLOOKUP([.C5];[.A:.F];6;0);VLOOKUP([.D5];[.A:.F];6;0);VLOOKUP([.E5];[.A:.F];6;0);) + [.B5]" office:value-type="float" office:value="19" calcext:value-type="float">
            <text:p>19</text:p>
          </table:table-cell>
          <table:table-cell table:formula="of:=MAX([.F:.F])" office:value-type="float" office:value="35" calcext:value-type="float">
            <text:p>35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6];[.A:.F];6;0);VLOOKUP([.D6];[.A:.F];6;0);VLOOKUP([.E6];[.A:.F];6;0);) + [.B6]"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table:formula="of:=MAX(VLOOKUP([.C7];[.A:.F];6;0);VLOOKUP([.D7];[.A:.F];6;0);VLOOKUP([.E7];[.A:.F];6;0);) + [.B7]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8];[.A:.F];6;0);VLOOKUP([.D8];[.A:.F];6;0);VLOOKUP([.E8];[.A:.F];6;0);) + [.B8]" office:value-type="float" office:value="35" calcext:value-type="float">
            <text:p>35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9];[.A:.F];6;0);VLOOKUP([.D9];[.A:.F];6;0);VLOOKUP([.E9];[.A:.F];6;0);) + [.B9]" office:value-type="float" office:value="14" calcext:value-type="float">
            <text:p>14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0];[.A:.F];6;0);VLOOKUP([.D10];[.A:.F];6;0);VLOOKUP([.E10];[.A:.F];6;0);) + [.B10]" office:value-type="float" office:value="7" calcext:value-type="float">
            <text:p>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table:formula="of:=MAX(VLOOKUP([.C11];[.A:.F];6;0);VLOOKUP([.D11];[.A:.F];6;0);VLOOKUP([.E11];[.A:.F];6;0);) + [.B11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MAX(VLOOKUP([.C12];[.A:.F];6;0);VLOOKUP([.D12];[.A:.F];6;0);VLOOKUP([.E12];[.A:.F];6;0);) + [.B12]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MAX(VLOOKUP([.C13];[.A:.F];6;0);VLOOKUP([.D13];[.A:.F];6;0);VLOOKUP([.E13];[.A:.F];6;0);) + [.B13]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MAX(VLOOKUP([.C14];[.A:.F];6;0);VLOOKUP([.D14];[.A:.F];6;0);VLOOKUP([.E14];[.A:.F];6;0);) + [.B14]" office:value-type="float" office:value="30" calcext:value-type="float">
            <text:p>30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  <table:table-cell table:formula="of:=MAX(VLOOKUP([.C15];[.A:.F];6;0);VLOOKUP([.D15];[.A:.F];6;0);VLOOKUP([.E15];[.A:.F];6;0);) + [.B15]" office:value-type="float" office:value="31" calcext:value-type="float">
            <text:p>31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6];[.A:.F];6;0);VLOOKUP([.D16];[.A:.F];6;0);VLOOKUP([.E16];[.A:.F];6;0);) + [.B16]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7];[.A:.F];6;0);VLOOKUP([.D17];[.A:.F];6;0);VLOOKUP([.E17];[.A:.F];6;0);) + [.B17]" office:value-type="float" office:value="23" calcext:value-type="float">
            <text:p>23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MAX(VLOOKUP([.C18];[.A:.F];6;0);VLOOKUP([.D18];[.A:.F];6;0);VLOOKUP([.E18];[.A:.F];6;0);) + [.B18]" office:value-type="float" office:value="29" calcext:value-type="float">
            <text:p>29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9];[.A:.F];6;0);VLOOKUP([.D19];[.A:.F];6;0);VLOOKUP([.E19];[.A:.F];6;0);) + [.B19]"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MAX(VLOOKUP([.C20];[.A:.F];6;0);VLOOKUP([.D20];[.A:.F];6;0);VLOOKUP([.E20];[.A:.F];6;0);) + [.B20]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21];[.A:.F];6;0);VLOOKUP([.D21];[.A:.F];6;0);VLOOKUP([.E21];[.A:.F];6;0);) + [.B21]" office:value-type="float" office:value="26" calcext:value-type="float">
            <text:p>26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table:formula="of:=MAX(VLOOKUP([.C22];[.A:.F];6;0);VLOOKUP([.D22];[.A:.F];6;0);VLOOKUP([.E22];[.A:.F];6;0);) + [.B22]" office:value-type="float" office:value="29" calcext:value-type="float">
            <text:p>29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table:formula="of:=MAX(VLOOKUP([.C23];[.A:.F];6;0);VLOOKUP([.D23];[.A:.F];6;0);VLOOKUP([.E23];[.A:.F];6;0);) + [.B23]" office:value-type="float" office:value="23" calcext:value-type="float">
            <text:p>23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24];[.A:.F];6;0);VLOOKUP([.D24];[.A:.F];6;0);VLOOKUP([.E24];[.A:.F];6;0);) + [.B24]"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</text:p>
          </table:table-cell>
          <table:table-cell table:formula="of:=MAX(VLOOKUP([.C25];[.A:.F];6;0);VLOOKUP([.D25];[.A:.F];6;0);VLOOKUP([.E25];[.A:.F];6;0);) + [.B25]" office:value-type="float" office:value="24" calcext:value-type="float">
            <text:p>24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26];[.A:.F];6;0);VLOOKUP([.D26];[.A:.F];6;0);VLOOKUP([.E26];[.A:.F];6;0);) + [.B26]" office:value-type="float" office:value="1" calcext:value-type="float">
            <text:p>1</text:p>
          </table:table-cell>
          <table:table-cell table:number-columns-repeated="16378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4c7e7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dd7e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8faadc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dc3e6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5b9bd5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.00.0000</text:date>, <text:time style:data-style-name="N2" text:time-value="20:55:48.1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nis M. Ushakov</meta:initial-creator>
    <meta:creation-date>2025-07-12T17:53:33</meta:creation-date>
    <dc:date>2026-04-24T21:06:41.737000000</dc:date>
    <meta:generator>LibreOffice/24.2.2.2$Windows_X86_64 LibreOffice_project/d56cc158d8a96260b836f100ef4b4ef25d6f1a01</meta:generator>
    <meta:editing-duration>PT12M25S</meta:editing-duration>
    <meta:editing-cycles>4</meta:editing-cycles>
    <meta:document-statistic meta:table-count="1" meta:cell-count="157" meta:object-count="0"/>
    <meta:user-defined meta:name="AppVersion">16.0300</meta:user-defined>
  </office:meta>
</office:document-meta>
</file>